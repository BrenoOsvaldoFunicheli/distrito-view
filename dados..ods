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MRR</text:p>
          </table:table-cell>
          <table:table-cell office:value-type="string" calcext:value-type="string">
            <text:p>Valor Total do Contrato</text:p>
          </table:table-cell>
          <table:table-cell office:value-type="string" calcext:value-type="string">
            <text:p>Prazo do Contrato (Meses)</text:p>
          </table:table-cell>
          <table:table-cell table:style-name="Default" office:value-type="string" calcext:value-type="string">
            <text:p>Data Inicial Contrato</text:p>
          </table:table-cell>
          <table:table-cell table:style-name="Default" office:value-type="string" calcext:value-type="string">
            <text:p>Data Final Contrato</text:p>
          </table:table-cell>
          <table:table-cell table:style-name="Default" office:value-type="string" calcext:value-type="string">
            <text:p>Data Churn</text:p>
          </table:table-cell>
          <table:table-cell office:value-type="string" calcext:value-type="string">
            <text:p>Churn Antecipado?</text:p>
          </table:table-cell>
          <table:table-cell office:value-type="string" calcext:value-type="string">
            <text:p>Forma de Pagamento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LIFETIME</text:p>
          </table:table-cell>
          <table:table-cell office:value-type="string" calcext:value-type="string">
            <text:p>Squad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68500" calcext:value-type="float">
            <text:p>68500</text:p>
          </table:table-cell>
          <table:table-cell office:value-type="float" office:value="890500" calcext:value-type="float">
            <text:p>890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/02/2025</text:p>
          </table:table-cell>
          <table:table-cell table:number-columns-repeated="2" office:value-type="string" calcext:value-type="string">
            <text:p>10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COMPASS GÁS E ENERGIA S.A</text:p>
          </table:table-cell>
          <table:table-cell office:value-type="string" calcext:value-type="string">
            <text:p>Squad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117463" calcext:value-type="float">
            <text:p>117463</text:p>
          </table:table-cell>
          <table:table-cell office:value-type="float" office:value="1409556" calcext:value-type="float">
            <text:p>14095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/02/2025</text:p>
          </table:table-cell>
          <table:table-cell table:number-columns-repeated="2" office:value-type="string" calcext:value-type="string">
            <text:p>27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COPASTUR &lt;&gt; Postmetria</text:p>
          </table:table-cell>
          <table:table-cell office:value-type="string" calcext:value-type="string">
            <text:p>Factory - PO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uris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4/2025</text:p>
          </table:table-cell>
          <table:table-cell table:number-columns-repeated="2"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Valor variavel</text:p>
          </table:table-cell>
        </table:table-row>
        <table:table-row table:style-name="ro1">
          <table:table-cell office:value-type="string" calcext:value-type="string">
            <text:p>TRACK &amp; FIELD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omércio e Varejo</text:p>
          </table:table-cell>
          <table:table-cell office:value-type="float" office:value="80000" calcext:value-type="float">
            <text:p>80000</text:p>
          </table:table-cell>
          <table:table-cell office:value-type="float" office:value="960000" calcext:value-type="float">
            <text:p>96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6/2025</text:p>
          </table:table-cell>
          <table:table-cell table:number-columns-repeated="2" office:value-type="string" calcext:value-type="string">
            <text:p>31/05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TRACK &amp; FIELD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omércio e Varejo</text:p>
          </table:table-cell>
          <table:table-cell office:value-type="float" office:value="40000" calcext:value-type="float">
            <text:p>4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6/2025</text:p>
          </table:table-cell>
          <table:table-cell table:number-columns-repeated="2" office:value-type="string" calcext:value-type="string">
            <text:p>31/05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Remuneração Variável</text:p>
          </table:table-cell>
        </table:table-row>
        <table:table-row table:style-name="ro1">
          <table:table-cell office:value-type="string" calcext:value-type="string">
            <text:p>ALMAP BBDO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Marketing e Publicidade</text:p>
          </table:table-cell>
          <table:table-cell office:value-type="float" office:value="102200" calcext:value-type="float">
            <text:p>102200</text:p>
          </table:table-cell>
          <table:table-cell office:value-type="float" office:value="1226400" calcext:value-type="float">
            <text:p>1226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7/2025</text:p>
          </table:table-cell>
          <table:table-cell table:number-columns-repeated="2"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BANCO PINE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150000" calcext:value-type="float">
            <text:p>15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7/2025</text:p>
          </table:table-cell>
          <table:table-cell table:number-columns-repeated="2"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*Rescisão após 3 meses e mediante a aviso prévio de 60 dias</text:p>
          </table:table-cell>
        </table:table-row>
        <table:table-row table:style-name="ro1">
          <table:table-cell office:value-type="string" calcext:value-type="string">
            <text:p>CNP SEGURADORA - COMPANHIA DE SEGUROS PREVIDENCIA DO SUL - PREVISUL - COMPANHIA DE SEGUROS PREVIDENCIA DO SUL - PREVISUL</text:p>
          </table:table-cell>
          <table:table-cell office:value-type="string" calcext:value-type="string">
            <text:p>Projetos IA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uros</text:p>
          </table:table-cell>
          <table:table-cell office:value-type="float" office:value="70000" calcext:value-type="float">
            <text:p>7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9/2025</text:p>
          </table:table-cell>
          <table:table-cell table:number-columns-repeated="2" office:value-type="string" calcext:value-type="string">
            <text:p>17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MICHELIN</text:p>
          </table:table-cell>
          <table:table-cell office:value-type="string" calcext:value-type="string">
            <text:p>Squad -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utomotivo</text:p>
          </table:table-cell>
          <table:table-cell office:value-type="float" office:value="135203" calcext:value-type="float">
            <text:p>135203</text:p>
          </table:table-cell>
          <table:table-cell office:value-type="float" office:value="1622436" calcext:value-type="float">
            <text:p>16224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/09/2025</text:p>
          </table:table-cell>
          <table:table-cell table:number-columns-repeated="2" office:value-type="string" calcext:value-type="string">
            <text:p>18/09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COMPASS GÁS E ENERGIA S.A</text:p>
          </table:table-cell>
          <table:table-cell office:value-type="string" calcext:value-type="string">
            <text:p>Squad -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125875" calcext:value-type="float">
            <text:p>125875</text:p>
          </table:table-cell>
          <table:table-cell office:value-type="float" office:value="629375" calcext:value-type="float">
            <text:p>629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10/2025</text:p>
          </table:table-cell>
          <table:table-cell table:number-columns-repeated="2" office:value-type="string" calcext:value-type="string">
            <text:p>27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</table:table-row>
        <table:table-row table:style-name="ro1">
          <table:table-cell office:value-type="string" calcext:value-type="string">
            <text:p>COMGÁS - COMPASS</text:p>
          </table:table-cell>
          <table:table-cell office:value-type="string" calcext:value-type="string">
            <text:p>Squad - AI Factory - GASPE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331740" calcext:value-type="float">
            <text:p>331740</text:p>
          </table:table-cell>
          <table:table-cell office:value-type="float" office:value="2985660" calcext:value-type="float">
            <text:p>29856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9/2025</text:p>
          </table:table-cell>
          <table:table-cell table:number-columns-repeated="2" office:value-type="string" calcext:value-type="string">
            <text:p>31/05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GASPEC</text:p>
          </table:table-cell>
        </table:table-row>
        <table:table-row table:style-name="ro1">
          <table:table-cell office:value-type="string" calcext:value-type="string">
            <text:p>BANCO BMG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99350" calcext:value-type="float">
            <text:p>99350</text:p>
          </table:table-cell>
          <table:table-cell office:value-type="float" office:value="397400" calcext:value-type="float">
            <text:p>397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/10/2025</text:p>
          </table:table-cell>
          <table:table-cell table:number-columns-repeated="2" office:value-type="string" calcext:value-type="string">
            <text:p>21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Mensal - 4 Parcelas</text:p>
          </table:table-cell>
        </table:table-row>
        <table:table-row table:style-name="ro1">
          <table:table-cell office:value-type="string" calcext:value-type="string">
            <text:p>BANCO BMG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21593.04" calcext:value-type="float">
            <text:p>21593,04</text:p>
          </table:table-cell>
          <table:table-cell office:value-type="float" office:value="107965.2" calcext:value-type="float">
            <text:p>107965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10/2025</text:p>
          </table:table-cell>
          <table:table-cell table:number-columns-repeated="2" office:value-type="string" calcext:value-type="string">
            <text:p>2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Mensal - 5 Parcelas</text:p>
          </table:table-cell>
        </table:table-row>
        <table:table-row table:style-name="ro1">
          <table:table-cell office:value-type="string" calcext:value-type="string">
            <text:p>BANCO BMG</text:p>
          </table:table-cell>
          <table:table-cell office:value-type="string" calcext:value-type="string">
            <text:p>Squad 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48439.44" calcext:value-type="float">
            <text:p>48439,44</text:p>
          </table:table-cell>
          <table:table-cell office:value-type="float" office:value="387515.52" calcext:value-type="float">
            <text:p>387515,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/02/2026</text:p>
          </table:table-cell>
          <table:table-cell table:number-columns-repeated="2" office:value-type="string" calcext:value-type="string">
            <text:p>21/10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Mensal - 8 Parcelas</text:p>
          </table:table-cell>
        </table:table-row>
        <table:table-row table:style-name="ro1">
          <table:table-cell office:value-type="string" calcext:value-type="string">
            <text:p>Yara Fertilizantes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gronegócio</text:p>
          </table:table-cell>
          <table:table-cell office:value-type="float" office:value="22176" calcext:value-type="float">
            <text:p>22176</text:p>
          </table:table-cell>
          <table:table-cell office:value-type="float" office:value="66528" calcext:value-type="float">
            <text:p>66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12/2025</text:p>
          </table:table-cell>
          <table:table-cell table:number-columns-repeated="2" office:value-type="string" calcext:value-type="string">
            <text:p>28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*Funding AWS</text:p>
          </table:table-cell>
        </table:table-row>
        <table:table-row table:style-name="ro1">
          <table:table-cell office:value-type="string" calcext:value-type="string">
            <text:p>JSL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ansporte e Mobilidade</text:p>
          </table:table-cell>
          <table:table-cell office:value-type="float" office:value="49086.5" calcext:value-type="float">
            <text:p>49086,5</text:p>
          </table:table-cell>
          <table:table-cell office:value-type="float" office:value="98173" calcext:value-type="float">
            <text:p>98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25</text:p>
          </table:table-cell>
          <table:table-cell table:number-columns-repeated="2" office:value-type="string" calcext:value-type="string">
            <text:p>09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2x - 50% no inicio e 50% na entrega</text:p>
          </table:table-cell>
        </table:table-row>
        <table:table-row table:style-name="ro1">
          <table:table-cell office:value-type="string" calcext:value-type="string">
            <text:p>ALPER SEGUROS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uros</text:p>
          </table:table-cell>
          <table:table-cell office:value-type="float" office:value="19154" calcext:value-type="float">
            <text:p>19154</text:p>
          </table:table-cell>
          <table:table-cell office:value-type="float" office:value="57462" calcext:value-type="float">
            <text:p>57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12/2025</text:p>
          </table:table-cell>
          <table:table-cell table:number-columns-repeated="2" office:value-type="string" calcext:value-type="string">
            <text:p>28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*Funding AWS</text:p>
          </table:table-cell>
        </table:table-row>
        <table:table-row table:style-name="ro1">
          <table:table-cell office:value-type="string" calcext:value-type="string">
            <text:p>PEPSICO DO BRASIL LTD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 e Comércio</text:p>
          </table:table-cell>
          <table:table-cell office:value-type="float" office:value="323483.33" calcext:value-type="float">
            <text:p>323483,33</text:p>
          </table:table-cell>
          <table:table-cell office:value-type="float" office:value="1940900" calcext:value-type="float">
            <text:p>1940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/12/2025</text:p>
          </table:table-cell>
          <table:table-cell table:number-columns-repeated="2" office:value-type="string" calcext:value-type="string">
            <text:p>01/07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</table:table-row>
        <table:table-row table:style-name="ro1">
          <table:table-cell office:value-type="string" calcext:value-type="string">
            <text:p>ALMAP BBDO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Marketing e Publicidade</text:p>
          </table:table-cell>
          <table:table-cell office:value-type="float" office:value="50147.91" calcext:value-type="float">
            <text:p>50147,91</text:p>
          </table:table-cell>
          <table:table-cell office:value-type="float" office:value="150443.73" calcext:value-type="float">
            <text:p>150443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/11/2025</text:p>
          </table:table-cell>
          <table:table-cell table:number-columns-repeated="2" office:value-type="string" calcext:value-type="string">
            <text:p>12/02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Subcontratação FC por 20k</text:p>
          </table:table-cell>
        </table:table-row>
        <table:table-row table:style-name="ro1">
          <table:table-cell office:value-type="string" calcext:value-type="string">
            <text:p>VITTA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37238.33" calcext:value-type="float">
            <text:p>37238,33</text:p>
          </table:table-cell>
          <table:table-cell office:value-type="float" office:value="111715" calcext:value-type="float">
            <text:p>111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table:number-columns-repeated="2"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*Funding AWS</text:p>
          </table:table-cell>
        </table:table-row>
        <table:table-row table:style-name="ro1">
          <table:table-cell office:value-type="string" calcext:value-type="string">
            <text:p>UNIMED BH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aúde</text:p>
          </table:table-cell>
          <table:table-cell office:value-type="float" office:value="41666.67" calcext:value-type="float">
            <text:p>41666,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table:number-columns-repeated="2"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*Funding AWS</text:p>
          </table:table-cell>
        </table:table-row>
        <table:table-row table:style-name="ro1">
          <table:table-cell office:value-type="string" calcext:value-type="string">
            <text:p>SWIFT - SEARA 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arejo</text:p>
          </table:table-cell>
          <table:table-cell office:value-type="float" office:value="13414.85" calcext:value-type="float">
            <text:p>13414,85</text:p>
          </table:table-cell>
          <table:table-cell office:value-type="float" office:value="174393" calcext:value-type="float">
            <text:p>174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/11/2025</text:p>
          </table:table-cell>
          <table:table-cell table:number-columns-repeated="2" office:value-type="string" calcext:value-type="string">
            <text:p>30/11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/>
        </table:table-row>
        <table:table-row table:style-name="ro1">
          <table:table-cell office:value-type="string" calcext:value-type="string">
            <text:p>SWIFT - SEARA [ AWS ]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arejo</text:p>
          </table:table-cell>
          <table:table-cell office:value-type="float" office:value="9230.77" calcext:value-type="float">
            <text:p>9230,7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/11/2025</text:p>
          </table:table-cell>
          <table:table-cell table:number-columns-repeated="2" office:value-type="string" calcext:value-type="string">
            <text:p>30/11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*Funding AWS</text:p>
          </table:table-cell>
        </table:table-row>
        <table:table-row table:style-name="ro1">
          <table:table-cell office:value-type="string" calcext:value-type="string">
            <text:p>BENEFICIÊNCIA PORTUGUESA <text:s/>BP - REAL E BENEMETRI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aúde</text:p>
          </table:table-cell>
          <table:table-cell office:value-type="float" office:value="84779.25" calcext:value-type="float">
            <text:p>84779,25</text:p>
          </table:table-cell>
          <table:table-cell office:value-type="float" office:value="254337.75" calcext:value-type="float">
            <text:p>254337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1/2026</text:p>
          </table:table-cell>
          <table:table-cell table:number-columns-repeated="2" office:value-type="string" calcext:value-type="string">
            <text:p>31/03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3x</text:p>
          </table:table-cell>
        </table:table-row>
        <table:table-row table:style-name="ro1">
          <table:table-cell office:value-type="string" calcext:value-type="string">
            <text:p>BANCO PINE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rviços Financeiros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/01/2026</text:p>
          </table:table-cell>
          <table:table-cell table:number-columns-repeated="2" office:value-type="string" calcext:value-type="string">
            <text:p>30/06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COMPASS GÁS E ENERGIA S.A</text:p>
          </table:table-cell>
          <table:table-cell office:value-type="string" calcext:value-type="string">
            <text:p>AI Factor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ústria</text:p>
          </table:table-cell>
          <table:table-cell office:value-type="float" office:value="66191.33" calcext:value-type="float">
            <text:p>66191,33</text:p>
          </table:table-cell>
          <table:table-cell office:value-type="float" office:value="198574" calcext:value-type="float">
            <text:p>198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/01/2026</text:p>
          </table:table-cell>
          <table:table-cell table:number-columns-repeated="2" office:value-type="string" calcext:value-type="string">
            <text:p>25/04/202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Á vista</text:p>
          </table:table-cell>
          <table:table-cell office:value-type="string" calcext:value-type="string">
            <text:p>10 d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50:17.915915609</meta:creation-date>
    <dc:date>2026-02-08T14:50:31.848565522</dc:date>
    <meta:editing-duration>PT14S</meta:editing-duration>
    <meta:editing-cycles>1</meta:editing-cycles>
    <meta:document-statistic meta:table-count="1" meta:cell-count="367" meta:object-count="0"/>
    <meta:generator>LibreOffice/7.3.7.2$Linux_X86_64 LibreOffice_project/30$Build-2</meta:generator>
  </office:meta>
</office:document-meta>
</file>